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linecap="butt" draw:fill="solid" draw:fill-color="#15203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 style:parent-style-name="standard">
      <style:graphic-properties draw:stroke="none" svg:stroke-width="0.026cm" svg:stroke-linecap="butt" draw:fill="solid" draw:fill-color="#2ac4b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" style:family="graphic" style:parent-style-name="standard">
      <style:graphic-properties draw:stroke="solid" svg:stroke-width="0.053cm" svg:stroke-color="#2ac4bc" svg:stroke-linecap="butt" draw:fill="solid" draw:fill-color="#f4f7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>
      <style:graphic-properties draw:stroke="solid" svg:stroke-width="0.053cm" svg:stroke-color="#d9aa49" svg:stroke-linecap="butt" draw:fill="solid" draw:fill-color="#f4f7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7" style:family="graphic" style:parent-style-name="standard">
      <style:graphic-properties draw:stroke="none" svg:stroke-width="0.026cm" svg:stroke-linecap="butt" draw:fill="solid" draw:fill-color="#d9aa4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>
      <style:graphic-properties draw:stroke="solid" svg:stroke-width="0.042cm" svg:stroke-color="#15203f" svg:stroke-linecap="butt" draw:fill="solid" draw:fill-color="#f4f7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gr16" style:family="graphic" style:parent-style-name="standard">
      <style:graphic-properties draw:stroke="none" svg:stroke-width="0.026cm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7" style:family="graphic" style:parent-style-name="standard">
      <style:graphic-properties draw:stroke="solid" svg:stroke-width="0.042cm" svg:stroke-color="#2ac4bc" svg:stroke-linecap="butt" draw:fill="solid" draw:fill-color="#f4f7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>
      <style:graphic-properties draw:stroke="solid" svg:stroke-width="0.053cm" svg:stroke-color="#15203f" svg:stroke-linecap="butt" draw:fill="solid" draw:fill-color="#f4f7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>
      <style:graphic-properties draw:stroke="solid" svg:stroke-width="0.053cm" svg:stroke-color="#3da774" svg:stroke-linecap="butt" draw:fill="solid" draw:fill-color="#f4f7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4" style:family="graphic" style:parent-style-name="standard">
      <style:graphic-properties draw:stroke="none" svg:stroke-width="0.026cm" svg:stroke-linecap="butt" draw:fill="solid" draw:fill-color="#3da77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>
      <style:graphic-properties draw:stroke="solid" svg:stroke-width="0.049cm" svg:stroke-color="#2ac4bc" svg:stroke-linecap="butt" draw:fill="solid" draw:fill-color="#f4f7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>
      <style:graphic-properties draw:stroke="solid" svg:stroke-width="0.049cm" svg:stroke-color="#15203f" svg:stroke-linecap="butt" draw:fill="solid" draw:fill-color="#f4f7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>
      <style:graphic-properties draw:stroke="solid" svg:stroke-width="0.049cm" svg:stroke-color="#d9aa49" svg:stroke-linecap="butt" draw:fill="solid" draw:fill-color="#f4f7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>
      <style:graphic-properties draw:stroke="solid" svg:stroke-width="0.049cm" svg:stroke-color="#3da774" svg:stroke-linecap="butt" draw:fill="solid" draw:fill-color="#f4f7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0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>
      <style:graphic-properties draw:stroke="solid" svg:stroke-width="0.053cm" svg:stroke-color="#d05d5d" svg:stroke-linecap="butt" draw:fill="solid" draw:fill-color="#f4f7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73" style:family="graphic" style:parent-style-name="standard">
      <style:graphic-properties draw:stroke="none" svg:stroke-width="0.026cm" svg:stroke-linecap="butt" draw:fill="solid" draw:fill-color="#d05d5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7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6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83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9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94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0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3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4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5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6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15203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solid" draw:fill-color="#2ac4bc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="solid" draw:fill-color="#f4f7fc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6" style:family="paragraph">
      <loext:graphic-properties draw:fill="solid" draw:fill-color="#d9aa49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9" style:family="paragraph">
      <style:paragraph-properties fo:margin-left="0cm" fo:margin-right="0cm" fo:margin-top="0cm" fo:margin-bottom="0.282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.282cm" fo:line-height="100%" fo:text-align="lef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1" style:family="paragraph">
      <loext:graphic-properties draw:fill="solid" draw:fill-color="#3da77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4" style:family="paragraph">
      <loext:graphic-properties draw:fill="solid" draw:fill-color="#d05d5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1pt" fo:letter-spacing="normal" fo:language="en" fo:country="US" fo:font-style="normal" style:text-underline-style="none" fo:font-weight="bold" fo:background-color="transparent" style:font-size-asian="31pt" style:font-style-asian="normal" style:font-weight-asian="bold" style:font-size-complex="31pt" style:font-style-complex="normal" style:font-weight-complex="bold"/>
    </style:style>
    <style:style style:name="T2" style:family="text">
      <style:text-properties fo:font-variant="normal" fo:text-transform="none" fo:color="#7ae1e1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variant="normal" fo:text-transform="none" fo:color="#2ac4bc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4" style:family="text">
      <style:text-properties fo:font-variant="normal" fo:text-transform="none" fo:color="#1b263b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d9aa49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variant="normal" fo:text-transform="none" fo:color="#2ac4bc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1b263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606e8a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font-variant="normal" fo:text-transform="none" fo:color="#2ac4bc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variant="normal" fo:text-transform="none" fo:color="#1b263b" loext:opacity="100%" style:text-outline="false" style:text-line-through-style="none" style:text-line-through-type="none" style:text-position="0% 100%" style:font-name="Calibri" fo:font-size="27pt" fo:letter-spacing="normal" fo:language="en" fo:country="US" fo:font-style="normal" style:text-underline-style="none" fo:font-weight="bold" fo:background-color="transparent" style:font-size-asian="27pt" style:font-style-asian="normal" style:font-weight-asian="bold" style:font-size-complex="27pt" style:font-style-complex="normal" style:font-weight-complex="bold"/>
    </style:style>
    <style:style style:name="T12" style:family="text">
      <style:text-properties fo:font-variant="normal" fo:text-transform="none" fo:color="#606e8a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1b263b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15203f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fo:font-variant="normal" fo:text-transform="none" fo:color="#3da774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fo:color="#1b263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8" style:family="text">
      <style:text-properties fo:font-variant="normal" fo:text-transform="none" fo:color="#606e8a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19" style:family="text">
      <style:text-properties fo:font-variant="normal" fo:text-transform="none" fo:color="#1b263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20" style:family="text">
      <style:text-properties fo:font-variant="normal" fo:text-transform="none" fo:color="#d05d5d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7ae1e1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2ac4bc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1b263b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d9aa49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606e8a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15203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3da774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d05d5d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Rectangle 2" draw:style-name="gr1" draw:text-style-name="P1" draw:layer="layout" svg:width="33.857cm" svg:height="1.06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2" draw:layer="layout" svg:width="8.584cm" svg:height="1.066cm" svg:x="25.273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33.857cm" svg:height="2.92cm" svg:x="0cm" svg:y="1.06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4" draw:layer="layout" svg:width="26.923cm" svg:height="3.174cm" svg:x="1.981cm" svg:y="2.54cm">
          <text:p text:style-name="P3"><text:span text:style-name="T1">Product AI Agent</text:span></text:p>
          <text:p text:style-name="P3"><text:span text:style-name="T2">Creating the best product representation for every product, every marketplace, and every listing workflow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" draw:style-name="gr4" draw:text-style-name="P5" draw:layer="layout" svg:width="14.274cm" svg:height="5.435cm" svg:x="2.083cm" svg:y="5.588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7" draw:style-name="gr2" draw:text-style-name="P2" draw:layer="layout" svg:width="14.274cm" svg:height="0.304cm" svg:x="2.083cm" svg:y="5.58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4" draw:layer="layout" svg:width="13.156cm" svg:height="4.571cm" svg:x="2.642cm" svg:y="6.147cm">
          <text:p text:style-name="P3"><text:span text:style-name="T3">Core Positioning</text:span></text:p>
          <text:p text:style-name="P3"><text:span text:style-name="T4">This implementation is not a basic copy generator. It is a product intelligence system built to create stronger product data, stronger imagery, and stronger marketplace fit from a single source inpu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6" draw:text-style-name="P5" draw:layer="layout" svg:width="14.528cm" svg:height="5.435cm" svg:x="17.145cm" svg:y="5.588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0" draw:style-name="gr7" draw:text-style-name="P6" draw:layer="layout" svg:width="14.528cm" svg:height="0.304cm" svg:x="17.145cm" svg:y="5.58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4" draw:layer="layout" svg:width="13.41cm" svg:height="4.571cm" svg:x="17.704cm" svg:y="6.147cm">
          <text:p text:style-name="P3"><text:span text:style-name="T5">Business Promise</text:span></text:p>
          <text:p text:style-name="P3"><text:span text:style-name="T4">The goal is simple and ambitious: every product should leave the system in its best possible form for Amazon, eBay, TikTok Shop, Shopify, and future channel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" draw:style-name="gr9" draw:text-style-name="P5" draw:layer="layout" svg:width="7.263cm" svg:height="4.114cm" svg:x="1.905cm" svg:y="11.761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3" draw:style-name="gr10" draw:text-style-name="P4" draw:layer="layout" svg:width="6.247cm" svg:height="2.793cm" svg:x="2.413cm" svg:y="12.168cm">
          <text:p text:style-name="P3"><text:span text:style-name="T6">1 Input</text:span></text:p>
          <text:p text:style-name="P3"><text:span text:style-name="T7">Title + Image</text:span></text:p>
          <text:p text:style-name="P3"><text:span text:style-name="T8">One product entry becomes a multi-marketplace output packag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4" draw:style-name="gr9" draw:text-style-name="P5" draw:layer="layout" svg:width="7.263cm" svg:height="4.114cm" svg:x="9.882cm" svg:y="11.761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5" draw:style-name="gr11" draw:text-style-name="P4" draw:layer="layout" svg:width="6.247cm" svg:height="2.793cm" svg:x="10.39cm" svg:y="12.168cm">
          <text:p text:style-name="P3"><text:span text:style-name="T6">5+ Outputs</text:span></text:p>
          <text:p text:style-name="P3"><text:span text:style-name="T7">Marketplace Ready</text:span></text:p>
          <text:p text:style-name="P3"><text:span text:style-name="T8">Dedicated data, SEO, pricing, and image paths per channel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6" draw:style-name="gr9" draw:text-style-name="P5" draw:layer="layout" svg:width="7.263cm" svg:height="4.114cm" svg:x="17.78cm" svg:y="11.761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7" draw:style-name="gr12" draw:text-style-name="P4" draw:layer="layout" svg:width="6.247cm" svg:height="2.793cm" svg:x="18.288cm" svg:y="12.168cm">
          <text:p text:style-name="P3"><text:span text:style-name="T6">Best Fit</text:span></text:p>
          <text:p text:style-name="P3"><text:span text:style-name="T7">Per Marketplace</text:span></text:p>
          <text:p text:style-name="P3"><text:span text:style-name="T8">Each marketplace gets its own optimized product vers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8" draw:style-name="gr9" draw:text-style-name="P5" draw:layer="layout" svg:width="7.263cm" svg:height="4.114cm" svg:x="25.757cm" svg:y="11.761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9" draw:style-name="gr13" draw:text-style-name="P4" draw:layer="layout" svg:width="6.247cm" svg:height="2.793cm" svg:x="26.265cm" svg:y="12.168cm">
          <text:p text:style-name="P3"><text:span text:style-name="T6">Editable</text:span></text:p>
          <text:p text:style-name="P3"><text:span text:style-name="T7">Operationally Safe</text:span></text:p>
          <text:p text:style-name="P3"><text:span text:style-name="T8">Generated drafts stay editable before final publish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" draw:text-style-name="P1" draw:layer="layout" svg:width="33.857cm" svg:height="0.863cm" svg:x="0cm" svg:y="18.18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4" draw:text-style-name="P4" draw:layer="layout" svg:width="16.509cm" svg:height="0.304cm" svg:x="1.168cm" svg:y="18.313cm">
          <text:p text:style-name="P3"><text:span text:style-name="T9">Product AI Agent | Best Product for Every Produc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Rectangle 1" draw:style-name="gr16" draw:text-style-name="P8" draw:layer="layout" svg:width="33.857cm" svg:height="19.049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33.857cm" svg:height="1.06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2" draw:layer="layout" svg:width="8.584cm" svg:height="1.066cm" svg:x="25.273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7" draw:text-style-name="P5" draw:layer="layout" svg:width="5.46cm" svg:height="0.863cm" svg:x="1.829cm" svg:y="1.829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5" draw:style-name="gr18" draw:text-style-name="P4" draw:layer="layout" svg:width="4.698cm" svg:height="0.405cm" svg:x="2.286cm" svg:y="2.007cm">
          <text:p text:style-name="P3"><text:span text:style-name="T10">PROBLE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9" draw:text-style-name="P4" draw:layer="layout" svg:width="28.447cm" svg:height="2.666cm" svg:x="1.829cm" svg:y="2.845cm">
          <text:p text:style-name="P3"><text:span text:style-name="T11">Why This Implementation Exists</text:span></text:p>
          <text:p text:style-name="P3"><text:span text:style-name="T12">The real problem is not generating content. The real problem is generating the right product for the right marketplac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0" draw:text-style-name="P10" draw:layer="layout" svg:width="17.779cm" svg:height="11.175cm" svg:x="2.286cm" svg:y="4.953cm">
          <text:p text:style-name="P9"><text:span text:style-name="T13">The same product performs differently across Amazon, eBay, TikTok Shop, and Shopify because each platform rewards different data structures, different search behavior, and different image standards.</text:span></text:p>
          <text:p text:style-name="P9"><text:span text:style-name="T13">Manual listing creation creates inconsistency in titles, attributes, pricing logic, and image quality.</text:span></text:p>
          <text:p text:style-name="P9"><text:span text:style-name="T13">Basic AI tools usually generate generic text, but generic text does not create a competitive listing.</text:span></text:p>
          <text:p text:style-name="P9"><text:span text:style-name="T13">To scale product operations, the system must understand the product first and optimize it for each destination secon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21" draw:text-style-name="P5" draw:layer="layout" svg:width="10.667cm" svg:height="3.936cm" svg:x="20.955cm" svg:y="5.334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9" draw:style-name="gr1" draw:text-style-name="P1" draw:layer="layout" svg:width="10.667cm" svg:height="0.304cm" svg:x="20.955cm" svg:y="5.3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2" draw:text-style-name="P4" draw:layer="layout" svg:width="9.549cm" svg:height="3.072cm" svg:x="21.514cm" svg:y="5.893cm">
          <text:p text:style-name="P3"><text:span text:style-name="T14">Strategic Answer</text:span></text:p>
          <text:p text:style-name="P3"><text:span text:style-name="T4">Build a layered product intelligence workflow that transforms one source product into multiple marketplace-specific best-fit output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1" draw:style-name="gr23" draw:text-style-name="P5" draw:layer="layout" svg:width="10.667cm" svg:height="3.936cm" svg:x="20.955cm" svg:y="10.033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2" draw:style-name="gr24" draw:text-style-name="P11" draw:layer="layout" svg:width="10.667cm" svg:height="0.304cm" svg:x="20.955cm" svg:y="10.03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5" draw:text-style-name="P4" draw:layer="layout" svg:width="9.549cm" svg:height="3.072cm" svg:x="21.514cm" svg:y="10.592cm">
          <text:p text:style-name="P3"><text:span text:style-name="T15">Guiding Principle</text:span></text:p>
          <text:p text:style-name="P3"><text:span text:style-name="T4">Best product for every product. The system should improve the merchandising quality of each item, not just automate the writing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33.857cm" svg:height="0.863cm" svg:x="0cm" svg:y="18.18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26" draw:text-style-name="P4" draw:layer="layout" svg:width="16.509cm" svg:height="0.304cm" svg:x="1.168cm" svg:y="18.313cm">
          <text:p text:style-name="P3"><text:span text:style-name="T9">Product AI Agent | Best Product for Every Produc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8.62cm" svg:height="10.476cm" svg:x="1.484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>
        <draw:custom-shape draw:name="Rectangle 1" draw:style-name="gr16" draw:text-style-name="P8" draw:layer="layout" svg:width="33.857cm" svg:height="19.049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33.857cm" svg:height="1.06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2" draw:layer="layout" svg:width="8.584cm" svg:height="1.066cm" svg:x="25.273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7" draw:text-style-name="P5" draw:layer="layout" svg:width="5.46cm" svg:height="0.863cm" svg:x="1.829cm" svg:y="1.829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5" draw:style-name="gr27" draw:text-style-name="P4" draw:layer="layout" svg:width="4.698cm" svg:height="0.405cm" svg:x="2.286cm" svg:y="2.007cm">
          <text:p text:style-name="P3"><text:span text:style-name="T10">SCOP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8" draw:text-style-name="P4" draw:layer="layout" svg:width="28.447cm" svg:height="2.666cm" svg:x="1.829cm" svg:y="2.845cm">
          <text:p text:style-name="P3"><text:span text:style-name="T11">Scope of the Current Implementation</text:span></text:p>
          <text:p text:style-name="P3"><text:span text:style-name="T12">What the platform already does inside one integrated workfl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29" draw:text-style-name="P5" draw:layer="layout" svg:width="6.146cm" svg:height="4.952cm" svg:x="1.575cm" svg:y="5.385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8" draw:style-name="gr2" draw:text-style-name="P2" draw:layer="layout" svg:width="1.066cm" svg:height="1.066cm" svg:x="1.981cm" svg:y="5.79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30" draw:text-style-name="P13" draw:layer="layout" svg:width="0.405cm" svg:height="0.355cm" svg:x="2.261cm" svg:y="5.867cm">
          <text:p text:style-name="P12"><text:span text:style-name="T16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1" draw:text-style-name="P4" draw:layer="layout" svg:width="5.231cm" svg:height="2.818cm" svg:x="2.032cm" svg:y="7.163cm">
          <text:p text:style-name="P3"><text:span text:style-name="T17">Input Capture</text:span></text:p>
          <text:p text:style-name="P3"><text:span text:style-name="T18">Accepts a source title and image as the starting product signal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1" draw:style-name="gr32" draw:text-style-name="P5" draw:layer="layout" svg:width="6.146cm" svg:height="4.952cm" svg:x="8.153cm" svg:y="5.385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2" draw:style-name="gr1" draw:text-style-name="P1" draw:layer="layout" svg:width="1.066cm" svg:height="1.066cm" svg:x="8.56cm" svg:y="5.79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3" draw:style-name="gr33" draw:text-style-name="P13" draw:layer="layout" svg:width="0.405cm" svg:height="0.355cm" svg:x="8.839cm" svg:y="5.867cm">
          <text:p text:style-name="P12"><text:span text:style-name="T16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4" draw:text-style-name="P4" draw:layer="layout" svg:width="5.231cm" svg:height="2.818cm" svg:x="8.611cm" svg:y="7.163cm">
          <text:p text:style-name="P3"><text:span text:style-name="T17">Product Understanding</text:span></text:p>
          <text:p text:style-name="P3"><text:span text:style-name="T18">Extracts visible cues and builds canonical product structur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5" draw:style-name="gr35" draw:text-style-name="P5" draw:layer="layout" svg:width="6.146cm" svg:height="4.952cm" svg:x="14.732cm" svg:y="5.385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6" draw:style-name="gr7" draw:text-style-name="P6" draw:layer="layout" svg:width="1.066cm" svg:height="1.066cm" svg:x="15.138cm" svg:y="5.79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7" draw:style-name="gr36" draw:text-style-name="P13" draw:layer="layout" svg:width="0.405cm" svg:height="0.355cm" svg:x="15.418cm" svg:y="5.867cm">
          <text:p text:style-name="P12"><text:span text:style-name="T16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7" draw:text-style-name="P4" draw:layer="layout" svg:width="5.231cm" svg:height="2.818cm" svg:x="15.189cm" svg:y="7.163cm">
          <text:p text:style-name="P3"><text:span text:style-name="T17">Marketplace Optimization</text:span></text:p>
          <text:p text:style-name="P3"><text:span text:style-name="T18">Generates dedicated outputs per selling channel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9" draw:style-name="gr38" draw:text-style-name="P5" draw:layer="layout" svg:width="6.146cm" svg:height="4.952cm" svg:x="21.311cm" svg:y="5.385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20" draw:style-name="gr24" draw:text-style-name="P11" draw:layer="layout" svg:width="1.066cm" svg:height="1.066cm" svg:x="21.717cm" svg:y="5.79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1" draw:style-name="gr39" draw:text-style-name="P13" draw:layer="layout" svg:width="0.405cm" svg:height="0.355cm" svg:x="21.996cm" svg:y="5.867cm">
          <text:p text:style-name="P12"><text:span text:style-name="T16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0" draw:text-style-name="P4" draw:layer="layout" svg:width="5.231cm" svg:height="2.818cm" svg:x="21.768cm" svg:y="7.163cm">
          <text:p text:style-name="P3"><text:span text:style-name="T17">Image Compliance</text:span></text:p>
          <text:p text:style-name="P3"><text:span text:style-name="T18">Creates cutout-first, marketplace-specific product imager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3" draw:style-name="gr29" draw:text-style-name="P5" draw:layer="layout" svg:width="6.146cm" svg:height="4.952cm" svg:x="27.889cm" svg:y="5.385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24" draw:style-name="gr2" draw:text-style-name="P2" draw:layer="layout" svg:width="1.066cm" svg:height="1.066cm" svg:x="28.296cm" svg:y="5.79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5" draw:style-name="gr41" draw:text-style-name="P13" draw:layer="layout" svg:width="0.405cm" svg:height="0.355cm" svg:x="28.575cm" svg:y="5.867cm">
          <text:p text:style-name="P12"><text:span text:style-name="T16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2" draw:text-style-name="P4" draw:layer="layout" svg:width="5.231cm" svg:height="2.818cm" svg:x="28.346cm" svg:y="7.163cm">
          <text:p text:style-name="P3"><text:span text:style-name="T17">Storage + Review</text:span></text:p>
          <text:p text:style-name="P3"><text:span text:style-name="T18">Returns a draft record that can be edited, validated, and reuse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7" draw:style-name="gr4" draw:text-style-name="P5" draw:layer="layout" svg:width="29.463cm" svg:height="2.793cm" svg:x="2.286cm" svg:y="11.811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28" draw:style-name="gr2" draw:text-style-name="P2" draw:layer="layout" svg:width="29.463cm" svg:height="0.304cm" svg:x="2.286cm" svg:y="11.81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43" draw:text-style-name="P4" draw:layer="layout" svg:width="28.345cm" svg:height="1.929cm" svg:x="2.845cm" svg:y="12.37cm">
          <text:p text:style-name="P3"><text:span text:style-name="T3">Scope Message</text:span></text:p>
          <text:p text:style-name="P3"><text:span text:style-name="T4">This is already more than generation. It is a connected system for understanding, optimizing, validating, and preparing products for channel-specific publishing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1" draw:layer="layout" svg:width="33.857cm" svg:height="0.863cm" svg:x="0cm" svg:y="18.18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44" draw:text-style-name="P4" draw:layer="layout" svg:width="16.509cm" svg:height="0.304cm" svg:x="1.168cm" svg:y="18.313cm">
          <text:p text:style-name="P3"><text:span text:style-name="T9">Product AI Agent | Best Product for Every Produc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8.62cm" svg:height="10.476cm" svg:x="1.484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">
        <draw:custom-shape draw:name="Rectangle 1" draw:style-name="gr16" draw:text-style-name="P8" draw:layer="layout" svg:width="33.857cm" svg:height="19.049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33.857cm" svg:height="1.06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2" draw:layer="layout" svg:width="8.584cm" svg:height="1.066cm" svg:x="25.273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7" draw:text-style-name="P5" draw:layer="layout" svg:width="5.46cm" svg:height="0.863cm" svg:x="1.829cm" svg:y="1.829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5" draw:style-name="gr45" draw:text-style-name="P4" draw:layer="layout" svg:width="4.698cm" svg:height="0.405cm" svg:x="2.286cm" svg:y="2.007cm">
          <text:p text:style-name="P3"><text:span text:style-name="T10">ARCHITECTU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6" draw:text-style-name="P4" draw:layer="layout" svg:width="28.447cm" svg:height="2.666cm" svg:x="1.829cm" svg:y="2.845cm">
          <text:p text:style-name="P3"><text:span text:style-name="T11">How the Product Becomes Smarter</text:span></text:p>
          <text:p text:style-name="P3"><text:span text:style-name="T12">The implementation uses layered intelligence instead of one-shot prompt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4" draw:text-style-name="P5" draw:layer="layout" svg:width="9.778cm" svg:height="3.606cm" svg:x="2.083cm" svg:y="4.953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8" draw:style-name="gr2" draw:text-style-name="P2" draw:layer="layout" svg:width="9.778cm" svg:height="0.304cm" svg:x="2.083cm" svg:y="4.95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7" draw:text-style-name="P4" draw:layer="layout" svg:width="8.66cm" svg:height="2.742cm" svg:x="2.642cm" svg:y="5.512cm">
          <text:p text:style-name="P3"><text:span text:style-name="T3">1. Vision Layer</text:span></text:p>
          <text:p text:style-name="P3"><text:span text:style-name="T4">Reads image cues such as visible color, brightness, palette, and presentation signal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21" draw:text-style-name="P5" draw:layer="layout" svg:width="9.778cm" svg:height="3.606cm" svg:x="12.04cm" svg:y="4.953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1" draw:style-name="gr1" draw:text-style-name="P1" draw:layer="layout" svg:width="9.778cm" svg:height="0.304cm" svg:x="12.04cm" svg:y="4.95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8" draw:text-style-name="P4" draw:layer="layout" svg:width="8.66cm" svg:height="2.742cm" svg:x="12.598cm" svg:y="5.512cm">
          <text:p text:style-name="P3"><text:span text:style-name="T14">2. Core Product Layer</text:span></text:p>
          <text:p text:style-name="P3"><text:span text:style-name="T4">Builds normalized title, category, product type, summary, features, and attribute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6" draw:text-style-name="P5" draw:layer="layout" svg:width="9.778cm" svg:height="3.606cm" svg:x="21.996cm" svg:y="4.953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4" draw:style-name="gr7" draw:text-style-name="P6" draw:layer="layout" svg:width="9.778cm" svg:height="0.304cm" svg:x="21.996cm" svg:y="4.95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9" draw:text-style-name="P4" draw:layer="layout" svg:width="8.66cm" svg:height="2.742cm" svg:x="22.555cm" svg:y="5.512cm">
          <text:p text:style-name="P3"><text:span text:style-name="T5">3. Attribute Mapping</text:span></text:p>
          <text:p text:style-name="P3"><text:span text:style-name="T4">Cleans and standardizes product data into marketplace-ready field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6" draw:style-name="gr21" draw:text-style-name="P5" draw:layer="layout" svg:width="9.778cm" svg:height="3.606cm" svg:x="2.083cm" svg:y="9.449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7" draw:style-name="gr1" draw:text-style-name="P1" draw:layer="layout" svg:width="9.778cm" svg:height="0.304cm" svg:x="2.083cm" svg:y="9.44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50" draw:text-style-name="P4" draw:layer="layout" svg:width="8.66cm" svg:height="2.742cm" svg:x="2.642cm" svg:y="10.008cm">
          <text:p text:style-name="P3"><text:span text:style-name="T14">4. Research Layer</text:span></text:p>
          <text:p text:style-name="P3"><text:span text:style-name="T4">Collects comparable listing signals, keyword patterns, and pricing contex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9" draw:style-name="gr23" draw:text-style-name="P5" draw:layer="layout" svg:width="9.778cm" svg:height="3.606cm" svg:x="12.04cm" svg:y="9.449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20" draw:style-name="gr24" draw:text-style-name="P11" draw:layer="layout" svg:width="9.778cm" svg:height="0.304cm" svg:x="12.04cm" svg:y="9.44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51" draw:text-style-name="P4" draw:layer="layout" svg:width="8.66cm" svg:height="2.742cm" svg:x="12.598cm" svg:y="10.008cm">
          <text:p text:style-name="P3"><text:span text:style-name="T15">5. SEO Layer</text:span></text:p>
          <text:p text:style-name="P3"><text:span text:style-name="T4">Turns product and research signals into search-oriented keyword cluster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2" draw:style-name="gr4" draw:text-style-name="P5" draw:layer="layout" svg:width="9.778cm" svg:height="3.606cm" svg:x="21.996cm" svg:y="9.449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23" draw:style-name="gr2" draw:text-style-name="P2" draw:layer="layout" svg:width="9.778cm" svg:height="0.304cm" svg:x="21.996cm" svg:y="9.44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52" draw:text-style-name="P4" draw:layer="layout" svg:width="8.66cm" svg:height="2.742cm" svg:x="22.555cm" svg:y="10.008cm">
          <text:p text:style-name="P3"><text:span text:style-name="T3">6. Validation Layer</text:span></text:p>
          <text:p text:style-name="P3"><text:span text:style-name="T4">Checks output quality before the product record is treated as read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" draw:text-style-name="P1" draw:layer="layout" svg:width="33.857cm" svg:height="0.863cm" svg:x="0cm" svg:y="18.18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53" draw:text-style-name="P4" draw:layer="layout" svg:width="16.509cm" svg:height="0.304cm" svg:x="1.168cm" svg:y="18.313cm">
          <text:p text:style-name="P3"><text:span text:style-name="T9">Product AI Agent | Best Product for Every Produc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8.62cm" svg:height="10.476cm" svg:x="1.484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">
        <draw:custom-shape draw:name="Rectangle 1" draw:style-name="gr16" draw:text-style-name="P8" draw:layer="layout" svg:width="33.857cm" svg:height="19.049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33.857cm" svg:height="1.06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2" draw:layer="layout" svg:width="8.584cm" svg:height="1.066cm" svg:x="25.273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7" draw:text-style-name="P5" draw:layer="layout" svg:width="5.46cm" svg:height="0.863cm" svg:x="1.829cm" svg:y="1.829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5" draw:style-name="gr54" draw:text-style-name="P4" draw:layer="layout" svg:width="4.698cm" svg:height="0.405cm" svg:x="2.286cm" svg:y="2.007cm">
          <text:p text:style-name="P3"><text:span text:style-name="T10">OPTIMIZ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5" draw:text-style-name="P4" draw:layer="layout" svg:width="28.447cm" svg:height="2.666cm" svg:x="1.829cm" svg:y="2.845cm">
          <text:p text:style-name="P3"><text:span text:style-name="T11">Marketplace-Specific Product Creation</text:span></text:p>
          <text:p text:style-name="P3"><text:span text:style-name="T12">Each marketplace gets a tailored product version, not a reused block of tex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6" draw:text-style-name="P10" draw:layer="layout" svg:width="16.636cm" svg:height="11.937cm" svg:x="2.235cm" svg:y="4.826cm">
          <text:p text:style-name="P9"><text:span text:style-name="T19">Amazon output emphasizes structured selling points, search terms, attribute depth, and white-background compliance.</text:span></text:p>
          <text:p text:style-name="P9"><text:span text:style-name="T19">eBay output emphasizes concise discoverability, item specifics, comparable listing behavior, and value-oriented structure.</text:span></text:p>
          <text:p text:style-name="P9"><text:span text:style-name="T19">TikTok Shop output emphasizes short-form, visual-first, conversion-friendly commerce copy and hero imagery.</text:span></text:p>
          <text:p text:style-name="P9"><text:span text:style-name="T19">Shopify output emphasizes storefront presentation, polished merchandising, tags, and SEO-focused metadata.</text:span></text:p>
          <text:p text:style-name="P9"><text:span text:style-name="T19">The system is designed so every marketplace receives the version of the product that gives it the best chance to perform well on that channel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6" draw:text-style-name="P5" draw:layer="layout" svg:width="11.81cm" svg:height="4.622cm" svg:x="19.609cm" svg:y="5.207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9" draw:style-name="gr7" draw:text-style-name="P6" draw:layer="layout" svg:width="11.81cm" svg:height="0.304cm" svg:x="19.609cm" svg:y="5.2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7" draw:text-style-name="P4" draw:layer="layout" svg:width="10.692cm" svg:height="3.758cm" svg:x="20.168cm" svg:y="5.766cm">
          <text:p text:style-name="P3"><text:span text:style-name="T5">Key Advantage</text:span></text:p>
          <text:p text:style-name="P3"><text:span text:style-name="T4">This implementation treats marketplace adaptation as a first-class capability. That is how it moves closer to production-grade commerce operations than basic AI listing tool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1" draw:style-name="gr23" draw:text-style-name="P5" draw:layer="layout" svg:width="11.81cm" svg:height="4.368cm" svg:x="19.609cm" svg:y="10.541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2" draw:style-name="gr24" draw:text-style-name="P11" draw:layer="layout" svg:width="11.81cm" svg:height="0.304cm" svg:x="19.609cm" svg:y="10.54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8" draw:text-style-name="P4" draw:layer="layout" svg:width="10.692cm" svg:height="3.504cm" svg:x="20.168cm" svg:y="11.1cm">
          <text:p text:style-name="P3"><text:span text:style-name="T15">Positioning Statement</text:span></text:p>
          <text:p text:style-name="P3"><text:span text:style-name="T4">The objective is not to create one acceptable listing. The objective is to create the best marketplace version of that product every tim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33.857cm" svg:height="0.863cm" svg:x="0cm" svg:y="18.18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9" draw:text-style-name="P4" draw:layer="layout" svg:width="16.509cm" svg:height="0.304cm" svg:x="1.168cm" svg:y="18.313cm">
          <text:p text:style-name="P3"><text:span text:style-name="T9">Product AI Agent | Best Product for Every Produc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8.62cm" svg:height="10.476cm" svg:x="1.484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">
        <draw:custom-shape draw:name="Rectangle 1" draw:style-name="gr16" draw:text-style-name="P8" draw:layer="layout" svg:width="33.857cm" svg:height="19.049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33.857cm" svg:height="1.06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2" draw:layer="layout" svg:width="8.584cm" svg:height="1.066cm" svg:x="25.273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7" draw:text-style-name="P5" draw:layer="layout" svg:width="5.46cm" svg:height="0.863cm" svg:x="1.829cm" svg:y="1.829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5" draw:style-name="gr60" draw:text-style-name="P4" draw:layer="layout" svg:width="4.698cm" svg:height="0.405cm" svg:x="2.286cm" svg:y="2.007cm">
          <text:p text:style-name="P3"><text:span text:style-name="T10">IMAG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1" draw:text-style-name="P4" draw:layer="layout" svg:width="28.447cm" svg:height="2.666cm" svg:x="1.829cm" svg:y="2.845cm">
          <text:p text:style-name="P3"><text:span text:style-name="T11">Image Workflow Designed for Real Marketplace Use</text:span></text:p>
          <text:p text:style-name="P3"><text:span text:style-name="T12">Visual output improves context while preserving the product itself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29" draw:text-style-name="P5" draw:layer="layout" svg:width="6.146cm" svg:height="4.952cm" svg:x="1.575cm" svg:y="5.385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8" draw:style-name="gr2" draw:text-style-name="P2" draw:layer="layout" svg:width="1.066cm" svg:height="1.066cm" svg:x="1.981cm" svg:y="5.79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62" draw:text-style-name="P13" draw:layer="layout" svg:width="0.405cm" svg:height="0.355cm" svg:x="2.261cm" svg:y="5.867cm">
          <text:p text:style-name="P12"><text:span text:style-name="T16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3" draw:text-style-name="P4" draw:layer="layout" svg:width="5.231cm" svg:height="2.818cm" svg:x="2.032cm" svg:y="7.163cm">
          <text:p text:style-name="P3"><text:span text:style-name="T17">Source Retention</text:span></text:p>
          <text:p text:style-name="P3"><text:span text:style-name="T18">Original upload stays available for audit, reprocessing, and trus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1" draw:style-name="gr32" draw:text-style-name="P5" draw:layer="layout" svg:width="6.146cm" svg:height="4.952cm" svg:x="8.153cm" svg:y="5.385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2" draw:style-name="gr1" draw:text-style-name="P1" draw:layer="layout" svg:width="1.066cm" svg:height="1.066cm" svg:x="8.56cm" svg:y="5.79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3" draw:style-name="gr64" draw:text-style-name="P13" draw:layer="layout" svg:width="0.405cm" svg:height="0.355cm" svg:x="8.839cm" svg:y="5.867cm">
          <text:p text:style-name="P12"><text:span text:style-name="T16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65" draw:text-style-name="P4" draw:layer="layout" svg:width="5.231cm" svg:height="2.818cm" svg:x="8.611cm" svg:y="7.163cm">
          <text:p text:style-name="P3"><text:span text:style-name="T17">Transparent Cutout</text:span></text:p>
          <text:p text:style-name="P3"><text:span text:style-name="T18">Product is isolated first before marketplace styling begin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5" draw:style-name="gr35" draw:text-style-name="P5" draw:layer="layout" svg:width="6.146cm" svg:height="4.952cm" svg:x="14.732cm" svg:y="5.385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6" draw:style-name="gr7" draw:text-style-name="P6" draw:layer="layout" svg:width="1.066cm" svg:height="1.066cm" svg:x="15.138cm" svg:y="5.79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7" draw:style-name="gr66" draw:text-style-name="P13" draw:layer="layout" svg:width="0.405cm" svg:height="0.355cm" svg:x="15.418cm" svg:y="5.867cm">
          <text:p text:style-name="P12"><text:span text:style-name="T16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67" draw:text-style-name="P4" draw:layer="layout" svg:width="5.231cm" svg:height="2.818cm" svg:x="15.189cm" svg:y="7.163cm">
          <text:p text:style-name="P3"><text:span text:style-name="T17">Amazon + eBay</text:span></text:p>
          <text:p text:style-name="P3"><text:span text:style-name="T18">White-background compositions are created for compliance-focused channel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9" draw:style-name="gr38" draw:text-style-name="P5" draw:layer="layout" svg:width="6.146cm" svg:height="4.952cm" svg:x="21.311cm" svg:y="5.385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20" draw:style-name="gr24" draw:text-style-name="P11" draw:layer="layout" svg:width="1.066cm" svg:height="1.066cm" svg:x="21.717cm" svg:y="5.79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1" draw:style-name="gr68" draw:text-style-name="P13" draw:layer="layout" svg:width="0.405cm" svg:height="0.355cm" svg:x="21.996cm" svg:y="5.867cm">
          <text:p text:style-name="P12"><text:span text:style-name="T16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69" draw:text-style-name="P4" draw:layer="layout" svg:width="5.231cm" svg:height="2.818cm" svg:x="21.768cm" svg:y="7.163cm">
          <text:p text:style-name="P3"><text:span text:style-name="T17">Shopify + TikTok</text:span></text:p>
          <text:p text:style-name="P3"><text:span text:style-name="T18">Styled backgrounds are created without changing the product color or shap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3" draw:style-name="gr29" draw:text-style-name="P5" draw:layer="layout" svg:width="6.146cm" svg:height="4.952cm" svg:x="27.889cm" svg:y="5.385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24" draw:style-name="gr2" draw:text-style-name="P2" draw:layer="layout" svg:width="1.066cm" svg:height="1.066cm" svg:x="28.296cm" svg:y="5.79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5" draw:style-name="gr70" draw:text-style-name="P13" draw:layer="layout" svg:width="0.405cm" svg:height="0.355cm" svg:x="28.575cm" svg:y="5.867cm">
          <text:p text:style-name="P12"><text:span text:style-name="T16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71" draw:text-style-name="P4" draw:layer="layout" svg:width="5.231cm" svg:height="2.818cm" svg:x="28.346cm" svg:y="7.163cm">
          <text:p text:style-name="P3"><text:span text:style-name="T17">Validation</text:span></text:p>
          <text:p text:style-name="P3"><text:span text:style-name="T18">Image dimensions, transparency, and background expectations are checke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7" draw:style-name="gr72" draw:text-style-name="P5" draw:layer="layout" svg:width="29.463cm" svg:height="2.666cm" svg:x="2.286cm" svg:y="11.989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28" draw:style-name="gr73" draw:text-style-name="P14" draw:layer="layout" svg:width="29.463cm" svg:height="0.304cm" svg:x="2.286cm" svg:y="11.9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74" draw:text-style-name="P4" draw:layer="layout" svg:width="28.345cm" svg:height="1.802cm" svg:x="2.845cm" svg:y="12.548cm">
          <text:p text:style-name="P3"><text:span text:style-name="T20">Critical Rule</text:span></text:p>
          <text:p text:style-name="P3"><text:span text:style-name="T4">The implementation has been corrected so styled image generation changes only the scene and not the product identity. No text, badges, or overlays are adde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1" draw:layer="layout" svg:width="33.857cm" svg:height="0.863cm" svg:x="0cm" svg:y="18.18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75" draw:text-style-name="P4" draw:layer="layout" svg:width="16.509cm" svg:height="0.304cm" svg:x="1.168cm" svg:y="18.313cm">
          <text:p text:style-name="P3"><text:span text:style-name="T9">Product AI Agent | Best Product for Every Produc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8.62cm" svg:height="10.476cm" svg:x="1.484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">
        <draw:custom-shape draw:name="Rectangle 1" draw:style-name="gr16" draw:text-style-name="P8" draw:layer="layout" svg:width="33.857cm" svg:height="19.049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33.857cm" svg:height="1.06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2" draw:layer="layout" svg:width="8.584cm" svg:height="1.066cm" svg:x="25.273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7" draw:text-style-name="P5" draw:layer="layout" svg:width="5.46cm" svg:height="0.863cm" svg:x="1.829cm" svg:y="1.829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5" draw:style-name="gr76" draw:text-style-name="P4" draw:layer="layout" svg:width="4.698cm" svg:height="0.405cm" svg:x="2.286cm" svg:y="2.007cm">
          <text:p text:style-name="P3"><text:span text:style-name="T10">COMMERCIAL LOGI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7" draw:text-style-name="P4" draw:layer="layout" svg:width="28.447cm" svg:height="2.666cm" svg:x="1.829cm" svg:y="2.845cm">
          <text:p text:style-name="P3"><text:span text:style-name="T11">SEO, Pricing, and Research Intelligence</text:span></text:p>
          <text:p text:style-name="P3"><text:span text:style-name="T12">The system is designed to make products more visible and more competitiv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4" draw:text-style-name="P5" draw:layer="layout" svg:width="9.803cm" svg:height="4.368cm" svg:x="2.083cm" svg:y="4.953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8" draw:style-name="gr2" draw:text-style-name="P2" draw:layer="layout" svg:width="9.803cm" svg:height="0.304cm" svg:x="2.083cm" svg:y="4.95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8" draw:text-style-name="P4" draw:layer="layout" svg:width="8.686cm" svg:height="3.504cm" svg:x="2.642cm" svg:y="5.512cm">
          <text:p text:style-name="P3"><text:span text:style-name="T3">SEO Optimization</text:span></text:p>
          <text:p text:style-name="P3"><text:span text:style-name="T4">Primary keywords, secondary keywords, title terms, and marketplace keyword clusters are generated to improve discoverabilit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21" draw:text-style-name="P5" draw:layer="layout" svg:width="9.803cm" svg:height="4.368cm" svg:x="12.04cm" svg:y="4.953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1" draw:style-name="gr1" draw:text-style-name="P1" draw:layer="layout" svg:width="9.803cm" svg:height="0.304cm" svg:x="12.04cm" svg:y="4.95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9" draw:text-style-name="P4" draw:layer="layout" svg:width="8.686cm" svg:height="3.504cm" svg:x="12.598cm" svg:y="5.512cm">
          <text:p text:style-name="P3"><text:span text:style-name="T14">Pricing Guidance</text:span></text:p>
          <text:p text:style-name="P3"><text:span text:style-name="T4">Recommended price, floor, ceiling, and pricing strategy are generated per marketplace to support stronger commercial positioning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6" draw:text-style-name="P5" draw:layer="layout" svg:width="9.803cm" svg:height="4.368cm" svg:x="21.996cm" svg:y="4.953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4" draw:style-name="gr7" draw:text-style-name="P6" draw:layer="layout" svg:width="9.803cm" svg:height="0.304cm" svg:x="21.996cm" svg:y="4.95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80" draw:text-style-name="P4" draw:layer="layout" svg:width="8.686cm" svg:height="3.504cm" svg:x="22.555cm" svg:y="5.512cm">
          <text:p text:style-name="P3"><text:span text:style-name="T5">Market Comparison</text:span></text:p>
          <text:p text:style-name="P3"><text:span text:style-name="T4">Comparable listings, search signals, and pricing ranges are used to inform optimization rather than leaving outputs generic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6" draw:style-name="gr23" draw:text-style-name="P5" draw:layer="layout" svg:width="28.193cm" svg:height="3.682cm" svg:x="2.794cm" svg:y="10.795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7" draw:style-name="gr24" draw:text-style-name="P11" draw:layer="layout" svg:width="28.193cm" svg:height="0.304cm" svg:x="2.794cm" svg:y="10.79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81" draw:text-style-name="P4" draw:layer="layout" svg:width="27.075cm" svg:height="2.818cm" svg:x="3.353cm" svg:y="11.354cm">
          <text:p text:style-name="P3"><text:span text:style-name="T15">Why this matters</text:span></text:p>
          <text:p text:style-name="P3"><text:span text:style-name="T4">A better listing is not only better wording. It is the combination of product accuracy, search visibility, pricing relevance, and channel-specific presentation qualit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1" draw:layer="layout" svg:width="33.857cm" svg:height="0.863cm" svg:x="0cm" svg:y="18.18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82" draw:text-style-name="P4" draw:layer="layout" svg:width="16.509cm" svg:height="0.304cm" svg:x="1.168cm" svg:y="18.313cm">
          <text:p text:style-name="P3"><text:span text:style-name="T9">Product AI Agent | Best Product for Every Produc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8.62cm" svg:height="10.476cm" svg:x="1.484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">
        <draw:custom-shape draw:name="Rectangle 1" draw:style-name="gr16" draw:text-style-name="P8" draw:layer="layout" svg:width="33.857cm" svg:height="19.049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33.857cm" svg:height="1.06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2" draw:layer="layout" svg:width="8.584cm" svg:height="1.066cm" svg:x="25.273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7" draw:text-style-name="P5" draw:layer="layout" svg:width="5.46cm" svg:height="0.863cm" svg:x="1.829cm" svg:y="1.829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5" draw:style-name="gr83" draw:text-style-name="P4" draw:layer="layout" svg:width="4.698cm" svg:height="0.405cm" svg:x="2.286cm" svg:y="2.007cm">
          <text:p text:style-name="P3"><text:span text:style-name="T10">OPERATIO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4" draw:text-style-name="P4" draw:layer="layout" svg:width="28.447cm" svg:height="2.666cm" svg:x="1.829cm" svg:y="2.845cm">
          <text:p text:style-name="P3"><text:span text:style-name="T11">Operational Value of the Draft Workflow</text:span></text:p>
          <text:p text:style-name="P3"><text:span text:style-name="T12">Why editable product drafts matter for real team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5" draw:text-style-name="P10" draw:layer="layout" svg:width="16.763cm" svg:height="12.191cm" svg:x="2.286cm" svg:y="4.953cm">
          <text:p text:style-name="P9"><text:span text:style-name="T19">Generated products are stored as reusable records rather than disposable responses.</text:span></text:p>
          <text:p text:style-name="P9"><text:span text:style-name="T19">Teams can edit core product data and marketplace-specific data independently.</text:span></text:p>
          <text:p text:style-name="P9"><text:span text:style-name="T19">Marketplace content and images can be regenerated without rebuilding the whole product from scratch.</text:span></text:p>
          <text:p text:style-name="P9"><text:span text:style-name="T19">Optimization can run as a second pass to improve an already created draft.</text:span></text:p>
          <text:p text:style-name="P9"><text:span text:style-name="T19">This creates a practical human-in-the-loop workflow for catalog teams, sellers, and reviewer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21" draw:text-style-name="P5" draw:layer="layout" svg:width="10.921cm" svg:height="4.698cm" svg:x="19.863cm" svg:y="5.461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9" draw:style-name="gr1" draw:text-style-name="P1" draw:layer="layout" svg:width="10.921cm" svg:height="0.304cm" svg:x="19.863cm" svg:y="5.46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86" draw:text-style-name="P4" draw:layer="layout" svg:width="9.803cm" svg:height="3.834cm" svg:x="20.422cm" svg:y="6.02cm">
          <text:p text:style-name="P3"><text:span text:style-name="T14">Business Outcome</text:span></text:p>
          <text:p text:style-name="P3"><text:span text:style-name="T4">The system accelerates listing creation while keeping a controlled review layer. That balance is what makes the implementation credible for production workflow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1" draw:style-name="gr4" draw:text-style-name="P5" draw:layer="layout" svg:width="10.921cm" svg:height="3.555cm" svg:x="19.863cm" svg:y="10.871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2" draw:style-name="gr2" draw:text-style-name="P2" draw:layer="layout" svg:width="10.921cm" svg:height="0.304cm" svg:x="19.863cm" svg:y="10.87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87" draw:text-style-name="P4" draw:layer="layout" svg:width="9.803cm" svg:height="2.691cm" svg:x="20.422cm" svg:y="11.43cm">
          <text:p text:style-name="P3"><text:span text:style-name="T3">Product Philosophy</text:span></text:p>
          <text:p text:style-name="P3"><text:span text:style-name="T4">Every draft is a working version of the product’s best possible representation, not just a rough AI sugges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33.857cm" svg:height="0.863cm" svg:x="0cm" svg:y="18.18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88" draw:text-style-name="P4" draw:layer="layout" svg:width="16.509cm" svg:height="0.304cm" svg:x="1.168cm" svg:y="18.313cm">
          <text:p text:style-name="P3"><text:span text:style-name="T9">Product AI Agent | Best Product for Every Produc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8.62cm" svg:height="10.476cm" svg:x="1.484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">
        <draw:custom-shape draw:name="Rectangle 1" draw:style-name="gr16" draw:text-style-name="P8" draw:layer="layout" svg:width="33.857cm" svg:height="19.049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33.857cm" svg:height="1.06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2" draw:layer="layout" svg:width="8.584cm" svg:height="1.066cm" svg:x="25.273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7" draw:text-style-name="P5" draw:layer="layout" svg:width="5.46cm" svg:height="0.863cm" svg:x="1.829cm" svg:y="1.829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5" draw:style-name="gr89" draw:text-style-name="P4" draw:layer="layout" svg:width="4.698cm" svg:height="0.405cm" svg:x="2.286cm" svg:y="2.007cm">
          <text:p text:style-name="P3"><text:span text:style-name="T10">COMPETITIVE POSI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0" draw:text-style-name="P4" draw:layer="layout" svg:width="28.447cm" svg:height="2.666cm" svg:x="1.829cm" svg:y="2.845cm">
          <text:p text:style-name="P3"><text:span text:style-name="T11">Why This Is Stronger Than Basic Tools</text:span></text:p>
          <text:p text:style-name="P3"><text:span text:style-name="T12">The differentiator is the system, not just the promp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1" draw:text-style-name="P10" draw:layer="layout" svg:width="17.017cm" svg:height="12.064cm" svg:x="2.286cm" svg:y="4.953cm">
          <text:p text:style-name="P9"><text:span text:style-name="T19">Basic tools usually stop at title and description generation.</text:span></text:p>
          <text:p text:style-name="P9"><text:span text:style-name="T19">This implementation combines product understanding, attribute structuring, research, SEO, pricing, image compliance, optimization, and validation.</text:span></text:p>
          <text:p text:style-name="P9"><text:span text:style-name="T19">It is built for multiple marketplaces with dedicated output behavior instead of one generic listing template.</text:span></text:p>
          <text:p text:style-name="P9"><text:span text:style-name="T19">It is extensible toward live marketplace integrations instead of being trapped in static prompt logic.</text:span></text:p>
          <text:p text:style-name="P9"><text:span text:style-name="T19">It is designed to create a stronger product outcome, not only a faster text outcom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6" draw:text-style-name="P5" draw:layer="layout" svg:width="10.667cm" svg:height="5.079cm" svg:x="20.066cm" svg:y="5.461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9" draw:style-name="gr7" draw:text-style-name="P6" draw:layer="layout" svg:width="10.667cm" svg:height="0.304cm" svg:x="20.066cm" svg:y="5.46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92" draw:text-style-name="P4" draw:layer="layout" svg:width="9.549cm" svg:height="4.215cm" svg:x="20.625cm" svg:y="6.02cm">
          <text:p text:style-name="P3"><text:span text:style-name="T5">Competitive Summary</text:span></text:p>
          <text:p text:style-name="P3"><text:span text:style-name="T4">The strength of the implementation is that it treats product generation as a full commercial workflow: understand, optimize, compare, validate, and prepare for publishing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33.857cm" svg:height="0.863cm" svg:x="0cm" svg:y="18.18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3" draw:text-style-name="P4" draw:layer="layout" svg:width="16.509cm" svg:height="0.304cm" svg:x="1.168cm" svg:y="18.313cm">
          <text:p text:style-name="P3"><text:span text:style-name="T9">Product AI Agent | Best Product for Every Produc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8.62cm" svg:height="10.476cm" svg:x="1.484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">
        <draw:custom-shape draw:name="Rectangle 1" draw:style-name="gr16" draw:text-style-name="P8" draw:layer="layout" svg:width="33.857cm" svg:height="19.049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33.857cm" svg:height="1.06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2" draw:layer="layout" svg:width="8.584cm" svg:height="1.066cm" svg:x="25.273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7" draw:text-style-name="P5" draw:layer="layout" svg:width="5.46cm" svg:height="0.863cm" svg:x="1.829cm" svg:y="1.829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5" draw:style-name="gr94" draw:text-style-name="P4" draw:layer="layout" svg:width="4.698cm" svg:height="0.405cm" svg:x="2.286cm" svg:y="2.007cm">
          <text:p text:style-name="P3"><text:span text:style-name="T10">STATU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5" draw:text-style-name="P4" draw:layer="layout" svg:width="28.447cm" svg:height="2.666cm" svg:x="1.829cm" svg:y="2.845cm">
          <text:p text:style-name="P3"><text:span text:style-name="T11">Current Reality and Honest Scope</text:span></text:p>
          <text:p text:style-name="P3"><text:span text:style-name="T12">Presenting the implementation strongly while staying technically defensib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23" draw:text-style-name="P5" draw:layer="layout" svg:width="9.778cm" svg:height="5.079cm" svg:x="2.083cm" svg:y="5.08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8" draw:style-name="gr24" draw:text-style-name="P11" draw:layer="layout" svg:width="9.778cm" svg:height="0.304cm" svg:x="2.083cm" svg:y="5.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6" draw:text-style-name="P4" draw:layer="layout" svg:width="8.66cm" svg:height="4.215cm" svg:x="2.642cm" svg:y="5.639cm">
          <text:p text:style-name="P3"><text:span text:style-name="T15">Already Live</text:span></text:p>
          <text:p text:style-name="P3"><text:span text:style-name="T4">End-to-end generation, marketplace-specific output, cutout-first image workflow, second-pass optimization, validation, stored drafts, and live official eBay research suppor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21" draw:text-style-name="P5" draw:layer="layout" svg:width="9.778cm" svg:height="5.079cm" svg:x="12.04cm" svg:y="5.08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1" draw:style-name="gr1" draw:text-style-name="P1" draw:layer="layout" svg:width="9.778cm" svg:height="0.304cm" svg:x="12.04cm" svg:y="5.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7" draw:text-style-name="P4" draw:layer="layout" svg:width="8.66cm" svg:height="4.215cm" svg:x="12.598cm" svg:y="5.639cm">
          <text:p text:style-name="P3"><text:span text:style-name="T14">Structured and Ready</text:span></text:p>
          <text:p text:style-name="P3"><text:span text:style-name="T4">Amazon, TikTok Shop, and Shopify are already integrated into the optimization pipeline and can be upgraded to live research mode when official credentials and platform access are availabl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4" draw:text-style-name="P5" draw:layer="layout" svg:width="9.778cm" svg:height="5.079cm" svg:x="21.996cm" svg:y="5.08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4" draw:style-name="gr2" draw:text-style-name="P2" draw:layer="layout" svg:width="9.778cm" svg:height="0.304cm" svg:x="21.996cm" svg:y="5.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8" draw:text-style-name="P4" draw:layer="layout" svg:width="8.66cm" svg:height="4.215cm" svg:x="22.555cm" svg:y="5.639cm">
          <text:p text:style-name="P3"><text:span text:style-name="T3">Professional Framing</text:span></text:p>
          <text:p text:style-name="P3"><text:span text:style-name="T4">The architecture is production-grade. Some marketplace live research connections depend on external platform approvals, not on missing system desig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33.857cm" svg:height="0.863cm" svg:x="0cm" svg:y="18.18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99" draw:text-style-name="P4" draw:layer="layout" svg:width="16.509cm" svg:height="0.304cm" svg:x="1.168cm" svg:y="18.313cm">
          <text:p text:style-name="P3"><text:span text:style-name="T9">Product AI Agent | Best Product for Every Produc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8.62cm" svg:height="10.476cm" svg:x="1.484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">
        <draw:custom-shape draw:name="Rectangle 2" draw:style-name="gr1" draw:text-style-name="P1" draw:layer="layout" svg:width="33.857cm" svg:height="1.06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2" draw:layer="layout" svg:width="8.584cm" svg:height="1.066cm" svg:x="25.273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7" draw:text-style-name="P5" draw:layer="layout" svg:width="5.46cm" svg:height="0.863cm" svg:x="1.829cm" svg:y="1.829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5" draw:style-name="gr100" draw:text-style-name="P4" draw:layer="layout" svg:width="4.698cm" svg:height="0.405cm" svg:x="2.286cm" svg:y="2.007cm">
          <text:p text:style-name="P3"><text:span text:style-name="T10">CONCLUS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01" draw:text-style-name="P4" draw:layer="layout" svg:width="28.447cm" svg:height="2.666cm" svg:x="1.829cm" svg:y="2.845cm">
          <text:p text:style-name="P3"><text:span text:style-name="T11">Closing Message</text:span></text:p>
          <text:p text:style-name="P3"><text:span text:style-name="T12">What this implementation is really built to d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4" draw:text-style-name="P5" draw:layer="layout" svg:width="29.209cm" svg:height="4.317cm" svg:x="2.337cm" svg:y="5.08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8" draw:style-name="gr2" draw:text-style-name="P2" draw:layer="layout" svg:width="29.209cm" svg:height="0.304cm" svg:x="2.337cm" svg:y="5.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02" draw:text-style-name="P4" draw:layer="layout" svg:width="28.091cm" svg:height="3.453cm" svg:x="2.896cm" svg:y="5.639cm">
          <text:p text:style-name="P3"><text:span text:style-name="T3">Final Positioning</text:span></text:p>
          <text:p text:style-name="P3"><text:span text:style-name="T4">Product AI Agent is designed to create the best product version for every product by combining product intelligence, marketplace adaptation, visual compliance, and commercial optimization in one workflow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9" draw:text-style-name="P5" draw:layer="layout" svg:width="7.263cm" svg:height="4.114cm" svg:x="1.27cm" svg:y="10.795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1" draw:style-name="gr103" draw:text-style-name="P4" draw:layer="layout" svg:width="6.247cm" svg:height="2.793cm" svg:x="1.778cm" svg:y="11.202cm">
          <text:p text:style-name="P3"><text:span text:style-name="T6">Better Data</text:span></text:p>
          <text:p text:style-name="P3"><text:span text:style-name="T7">Structured + Searchable</text:span></text:p>
          <text:p text:style-name="P3"><text:span text:style-name="T8">Clearer titles, attributes, summaries, and marketplace fi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" draw:style-name="gr9" draw:text-style-name="P5" draw:layer="layout" svg:width="7.263cm" svg:height="4.114cm" svg:x="9.247cm" svg:y="10.795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3" draw:style-name="gr104" draw:text-style-name="P4" draw:layer="layout" svg:width="6.247cm" svg:height="2.793cm" svg:x="9.755cm" svg:y="11.202cm">
          <text:p text:style-name="P3"><text:span text:style-name="T6">Better Images</text:span></text:p>
          <text:p text:style-name="P3"><text:span text:style-name="T7">Compliant + Branded</text:span></text:p>
          <text:p text:style-name="P3"><text:span text:style-name="T8">Marketplace-specific visuals without harming product identit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4" draw:style-name="gr9" draw:text-style-name="P5" draw:layer="layout" svg:width="7.263cm" svg:height="4.114cm" svg:x="17.145cm" svg:y="10.795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5" draw:style-name="gr105" draw:text-style-name="P4" draw:layer="layout" svg:width="6.247cm" svg:height="2.793cm" svg:x="17.653cm" svg:y="11.202cm">
          <text:p text:style-name="P3"><text:span text:style-name="T6">Better Decisions</text:span></text:p>
          <text:p text:style-name="P3"><text:span text:style-name="T7">Research + Pricing</text:span></text:p>
          <text:p text:style-name="P3"><text:span text:style-name="T8">Smarter competitive positioning per channel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6" draw:style-name="gr9" draw:text-style-name="P5" draw:layer="layout" svg:width="7.263cm" svg:height="4.114cm" svg:x="25.122cm" svg:y="10.795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7" draw:style-name="gr106" draw:text-style-name="P4" draw:layer="layout" svg:width="6.247cm" svg:height="2.793cm" svg:x="25.63cm" svg:y="11.202cm">
          <text:p text:style-name="P3"><text:span text:style-name="T6">Better Workflow</text:span></text:p>
          <text:p text:style-name="P3"><text:span text:style-name="T7">Editable + Scalable</text:span></text:p>
          <text:p text:style-name="P3"><text:span text:style-name="T8">Draft-based product operations for real team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" draw:text-style-name="P1" draw:layer="layout" svg:width="33.857cm" svg:height="0.863cm" svg:x="0cm" svg:y="18.18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07" draw:text-style-name="P4" draw:layer="layout" svg:width="16.509cm" svg:height="0.304cm" svg:x="1.168cm" svg:y="18.313cm">
          <text:p text:style-name="P3"><text:span text:style-name="T9">Product AI Agent | Best Product for Every Produc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8.62cm" svg:height="10.476cm" svg:x="1.484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 style:writing-mode="lr-tb">
        <text:list-style style:name="Title_20_Slide-subtitle" style:display-name="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center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Calibri" fo:font-family="Calibri" fo:font-size="4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Noto Sans Devanagari" style:font-family-complex="'Noto Sans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13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graphic-properties style:writing-mode="lr-tb"/>
      <style:paragraph-properties fo:margin-left="0cm" fo:margin-right="0cm" fo:margin-top="0.113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lef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8" style:family="paragraph">
      <loext:graphic-properties draw:fill="none" draw:fill-color="#ffffff"/>
      <style:paragraph-properties fo:text-align="lef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righ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.226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7" style:family="paragraph">
      <loext:graphic-properties draw:fill="none"/>
      <style:paragraph-properties fo:text-align="left" style:font-independent-line-spacing="true"/>
      <style:text-properties fo:font-size="32pt"/>
    </style:style>
    <style:style style:name="MP18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9" style:family="paragraph">
      <loext:graphic-properties draw:fill="none"/>
      <style:paragraph-properties fo:text-align="left" style:font-independent-line-spacing="true"/>
      <style:text-properties fo:font-size="40pt"/>
    </style:style>
    <style:style style:name="MP20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1" style:family="paragraph">
      <loext:graphic-properties draw:fill="none"/>
      <style:paragraph-properties fo:text-align="left" style:font-independent-line-spacing="true"/>
      <style:text-properties fo:font-size="20pt"/>
    </style:style>
    <style:style style:name="MP22" style:family="paragraph">
      <style:paragraph-properties fo:margin-left="0cm" fo:margin-right="0cm" fo:margin-top="0.198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5" style:family="paragraph">
      <style:paragraph-properties fo:margin-left="0cm" fo:margin-right="0cm" fo:margin-top="0.127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6" style:family="paragraph">
      <loext:graphic-properties draw:fill="none"/>
      <style:paragraph-properties fo:text-align="left" style:font-independent-line-spacing="true"/>
      <style:text-properties fo:font-size="28pt"/>
    </style:style>
    <style:style style:name="MP27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8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29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27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.113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2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3" style:family="paragraph">
      <style:paragraph-properties fo:margin-left="0cm" fo:margin-right="0cm" fo:margin-top="0.099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4" style:family="paragraph">
      <loext:graphic-properties draw:fill="none"/>
      <style:paragraph-properties fo:text-align="left" style:font-independent-line-spacing="true"/>
      <style:text-properties fo:font-size="14pt"/>
    </style:style>
    <style:style style:name="MP35" style:family="paragraph">
      <style:paragraph-properties fo:text-align="left"/>
      <style:text-properties fo:font-size="32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1.27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953cm"/>
        <style:text-properties fo:color="#8b8b8b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•">
        <style:list-level-properties/>
        <style:text-properties fo:font-family="Arial" fo:color="#000000" fo:font-size="100%"/>
      </text:list-level-style-bullet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Subtitle 2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2">Click to edit Master subtitle style</text:span></text:p>
        </draw:text-box>
      </draw:frame>
      <draw:frame draw:name="Date Placeholder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3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7" draw:text-style-name="MP17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1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2" draw:text-style-name="MP17" draw:layer="backgroundobjects" svg:width="16.721cm" svg:height="16.253cm" svg:x="1.27cm" svg:y="0.763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3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7" draw:text-style-name="MP17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1" draw:text-style-name="MP19" draw:layer="backgroundobjects" svg:width="21.589cm" svg:height="3.783cm" svg:x="2.006cm" svg:y="12.241cm" presentation:class="title" presentation:user-transformed="true">
        <draw:text-box>
          <text:p text:style-name="MP18"><text:span text:style-name="MT8">Click to edit Master title style</text:span></text:p>
        </draw:text-box>
      </draw:frame>
      <draw:frame draw:name="Text Placeholder 2" presentation:style-name="Mpr22" draw:text-style-name="MP21" draw:layer="backgroundobjects" svg:width="21.589cm" svg:height="4.166cm" svg:x="2.006cm" svg:y="8.074cm" presentation:class="outline" presentation:user-transformed="true">
        <draw:text-box>
          <text:p text:style-name="MP20"><text:span text:style-name="MT9">Click to edit Master text styles</text:span></text:p>
        </draw:text-box>
      </draw:frame>
      <draw:frame draw:name="Date Placeholder 3" presentation:style-name="Mpr2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23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2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7" draw:text-style-name="MP26" draw:layer="backgroundobjects" svg:width="11.217cm" svg:height="12.571cm" svg:x="1.27cm" svg:y="4.445cm" presentation:class="outline" presentation:user-transformed="true">
        <draw:text-box>
          <text:list text:style-name="ML6">
            <text:list-item>
              <text:p text:style-name="MP2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26" draw:layer="backgroundobjects" svg:width="11.217cm" svg:height="12.571cm" svg:x="12.912cm" svg:y="4.445cm" presentation:class="outline" presentation:user-transformed="true">
        <draw:text-box>
          <text:list text:style-name="ML6">
            <text:list-item>
              <text:p text:style-name="MP2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2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2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28" draw:layer="backgroundobjects" svg:width="11.222cm" svg:height="1.776cm" svg:x="1.27cm" svg:y="4.264cm" presentation:class="outline" presentation:user-transformed="true">
        <draw:text-box>
          <text:p text:style-name="MP27"><text:span text:style-name="MT11">Click to edit Master text styles</text:span></text:p>
        </draw:text-box>
      </draw:frame>
      <draw:frame draw:name="Content Placeholder 3" presentation:style-name="Mpr33" draw:text-style-name="MP28" draw:layer="backgroundobjects" svg:width="11.222cm" svg:height="10.975cm" svg:x="1.27cm" svg:y="6.041cm" presentation:class="outline" presentation:user-transformed="true">
        <draw:text-box>
          <text:list text:style-name="ML6">
            <text:list-item>
              <text:p text:style-name="MP27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8" draw:layer="backgroundobjects" svg:width="11.226cm" svg:height="1.776cm" svg:x="12.903cm" svg:y="4.264cm" presentation:class="outline" presentation:user-transformed="true">
        <draw:text-box>
          <text:p text:style-name="MP27"><text:span text:style-name="MT11">Click to edit Master text styles</text:span></text:p>
        </draw:text-box>
      </draw:frame>
      <draw:frame draw:name="Content Placeholder 5" presentation:style-name="Mpr33" draw:text-style-name="MP28" draw:layer="backgroundobjects" svg:width="11.226cm" svg:height="10.975cm" svg:x="12.903cm" svg:y="6.041cm" presentation:class="outline" presentation:user-transformed="true">
        <draw:text-box>
          <text:list text:style-name="ML6">
            <text:list-item>
              <text:p text:style-name="MP27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7" presentation:style-name="Mpr34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8" presentation:style-name="Mpr34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7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3" presentation:style-name="Mpr3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4" presentation:style-name="Mpr3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1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2" presentation:style-name="Mpr41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3" presentation:style-name="Mpr41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Blank-title" draw:layer="backgroundobjects" svg:width="30.471cm" svg:height="3.18cm" svg:x="1.692cm" svg:y="0.76cm" presentation:class="title" presentation:placeholder="true">
        <draw:text-box/>
      </draw:frame>
      <draw:frame presentation:style-name="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4" draw:text-style-name="MP21" draw:layer="backgroundobjects" svg:width="8.355cm" svg:height="3.227cm" svg:x="1.27cm" svg:y="0.758cm" presentation:class="title" presentation:user-transformed="true">
        <draw:text-box>
          <text:p text:style-name="MP32"><text:span text:style-name="MT13">Click to edit Master title style</text:span></text:p>
        </draw:text-box>
      </draw:frame>
      <draw:frame draw:name="Content Placeholder 2" presentation:style-name="Mpr45" draw:text-style-name="MP17" draw:layer="backgroundobjects" svg:width="14.198cm" svg:height="16.258cm" svg:x="9.931cm" svg:y="0.758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34" draw:layer="backgroundobjects" svg:width="8.355cm" svg:height="13.03cm" svg:x="1.27cm" svg:y="3.986cm" presentation:class="outline" presentation:user-transformed="true">
        <draw:text-box>
          <text:p text:style-name="MP33"><text:span text:style-name="MT14">Click to edit Master text styles</text:span></text:p>
        </draw:text-box>
      </draw:frame>
      <draw:frame draw:name="Date Placeholder 4" presentation:style-name="Mpr46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46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46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9" draw:text-style-name="MP21" draw:layer="backgroundobjects" svg:width="15.239cm" svg:height="1.573cm" svg:x="4.979cm" svg:y="13.335cm" presentation:class="title" presentation:user-transformed="true">
        <draw:text-box>
          <text:p text:style-name="MP32"><text:span text:style-name="MT13">Click to edit Master title style</text:span></text:p>
        </draw:text-box>
      </draw:frame>
      <draw:frame draw:name="Picture Placeholder 2" presentation:style-name="Mpr50" draw:text-style-name="MP17" draw:layer="backgroundobjects" svg:width="15.239cm" svg:height="11.429cm" svg:x="4.979cm" svg:y="1.702cm" presentation:class="outline" presentation:user-transformed="true">
        <draw:text-box>
          <text:list text:style-name="ML13">
            <text:list-item>
              <text:p text:style-name="MP35">Click to edit the outline text format</text:p>
              <text:list>
                <text:list-item>
                  <text:p text:style-name="MP35">Second Outline Level</text:p>
                  <text:list>
                    <text:list-item>
                      <text:p text:style-name="MP35">Third Outline Level</text:p>
                      <text:list>
                        <text:list-item>
                          <text:p text:style-name="MP35">Fourth Outline Level</text:p>
                          <text:list>
                            <text:list-item>
                              <text:p text:style-name="MP35">Fifth Outline Level</text:p>
                              <text:list>
                                <text:list-item>
                                  <text:p text:style-name="MP35">Sixth Outline Level</text:p>
                                  <text:list>
                                    <text:list-item>
                                      <text:p text:style-name="MP3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1" draw:text-style-name="MP34" draw:layer="backgroundobjects" svg:width="15.239cm" svg:height="2.235cm" svg:x="4.979cm" svg:y="14.909cm" presentation:class="outline" presentation:user-transformed="true">
        <draw:text-box>
          <text:p text:style-name="MP33"><text:span text:style-name="MT14">Click to edit Master text styles</text:span></text:p>
        </draw:text-box>
      </draw:frame>
      <draw:frame draw:name="Date Placeholder 4" presentation:style-name="Mpr52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52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52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escription>generated using python-pptx</dc:description>
    <meta:editing-cycles>2</meta:editing-cycles>
    <meta:creation-date>2013-01-27T09:14:16</meta:creation-date>
    <dc:date>2026-06-09T17:33:08.282548523</dc:date>
    <meta:editing-duration>P1DT19M37S</meta:editing-duration>
    <meta:generator>LibreOffice/26.2.3.2$Linux_X86_64 LibreOffice_project/620$Build-2</meta:generator>
    <meta:document-statistic meta:object-count="378"/>
    <meta:user-defined meta:name="AppVersion">14.0000</meta:user-defined>
    <meta:user-defined meta:name="PresentationFormat">On-screen Show (4:3)</meta:user-defined>
  </office:meta>
</office:document-meta>
</file>